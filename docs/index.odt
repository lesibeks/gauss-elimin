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2.png"/>
  <manifest:file-entry manifest:media-type="application/xml" manifest:full-path="Formula-10/settings.xml"/>
  <manifest:file-entry manifest:media-type="application/xml" manifest:full-path="Formula-10/content.xml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10/"/>
  <manifest:file-entry manifest:media-type="application/vnd.oasis.opendocument.formula" manifest:full-path="Formula-10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65535*"/>
    </style:style>
  </office:automatic-styles>
  <office:body>
    <office:text>
      <text:p text:style-name="Title">Riešenie sústav lineárnych rovníc pomocou Gaussovej eliminačnej metódy</text:p>
      <text:p text:style-name="Author">Aliaksandra Kibryk</text:p>
      <text:p text:style-name="Date">2026-04-18</text:p>
      <text:table-of-content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motivačný-úvod"/>1 Motivačný úvod<text:bookmark-end text:name="motivačný-úvod"/></text:h>
      <text:p text:style-name="First_20_paragraph">V technickej praxi a inžinierskych disciplínach sa mimoriadne často stretávame s potrebou riešiť komplexné sústavy lineárnych rovníc. Pri analýze mechanických sústav, vyvažovaní síl v statike alebo pri výpočtoch v kinematike je často potrebné určiť viacero neznámych parametrov súčasne.</text:p>
      <text:p text:style-name="Text_20_body">Napríklad pri analýze síl pôsobiacich na teleso na naklonenej rovine s viacerými väzbami (napríklad systém kladiek) vieme fyzikálny problém transformovať do matematického modelu reprezentovaného maticami. Efektívne riešenie takýchto modelov pomocou výpočtovej techniky a softvéru R je kľúčovým nástrojom moderného materiálového inžinierstva.</text:p>
      <text:h text:style-name="Heading_20_2" text:outline-level="2"><text:bookmark-start text:name="teoretické-pozadie"/>2 Teoretické pozadie<text:bookmark-end text:name="teoretické-pozadie"/></text:h>
      <text:p text:style-name="First_20_paragraph">Sústavu <draw:frame draw:style-name="fr1" text:anchor-type="as-char"><draw:object xlink:href="Formula-0/" xlink:type="simple" xlink:show="embed" xlink:actuate="onLoad"/></draw:frame> lineárnych rovníc o <draw:frame draw:style-name="fr1" text:anchor-type="as-char"><draw:object xlink:href="Formula-2/" xlink:type="simple" xlink:show="embed" xlink:actuate="onLoad"/></draw:frame> neznámych zapisujeme v maticovom tvare:</text:p>
      <text:p text:style-name="Text_20_body"><text:bookmark-start text:name="eq-maticovy-tvar"/><draw:frame draw:style-name="fr2" text:anchor-type="paragraph"><draw:object xlink:href="Formula-4/" xlink:type="simple" xlink:show="embed" xlink:actuate="onLoad"/></draw:frame><text:bookmark-end text:name="eq-maticovy-tvar"/></text:p>
      <text:p text:style-name="Text_20_body">Podľa Gaussovej metódy (Strang 2016) transformujeme rozšírenú maticu <draw:frame draw:style-name="fr1" text:anchor-type="as-char"><draw:object xlink:href="Formula-6/" xlink:type="simple" xlink:show="embed" xlink:actuate="onLoad"/></draw:frame> na hornú trojuholníkovú maticu pomocou elementárnych riadkových operácií.</text:p>
      <text:h text:style-name="Heading_20_2" text:outline-level="2"><text:bookmark-start text:name="praktická-implementácia-v-r"/>3 Praktická implementácia v R<text:bookmark-end text:name="praktická-implementácia-v-r"/></text:h>
      <text:p text:style-name="First_20_paragraph">V systéme R môžeme sústavy riešiť priamo funkciou <text:span text:style-name="Source_Text">solve()</text:span>, alebo simulovať proces eliminácie. Uvažujme nasledujúcu sústavu:</text:p>
      <text:p text:style-name="Preformatted_20_Text">
<text:span text:style-name="CommentTok"># Definícia matice koeficientov A, vektora pravých strán b a f-cie pre eliminaciu RowRed vektora pravých strán b</text:span>
</text:p>
      <text:p text:style-name="Preformatted_20_Text">
<text:span text:style-name="NormalTok">A </text:span><text:span text:style-name="OtherTok">&lt;-</text:span><text:span text:style-name="NormalTok"><text:s text:c="1"/></text:span><text:span text:style-name="FunctionTok">matrix</text:span><text:span text:style-name="NormalTok">(</text:span><text:span text:style-name="FunctionTok">c</text:span><text:span text:style-name="NormalTok">(</text:span><text:span text:style-name="DecValTok">3</text:span><text:span text:style-name="NormalTok">, </text:span><text:span text:style-name="DecValTok">2</text:span><text:span text:style-name="NormalTok">, </text:span><text:span text:style-name="SpecialCharTok">-</text:span><text:span text:style-name="DecValTok">1</text:span><text:span text:style-name="NormalTok">, </text:span>
</text:p>
      <text:p text:style-name="Preformatted_20_Text">
<text:span text:style-name="NormalTok"><text:s text:c="14"/></text:span><text:span text:style-name="DecValTok">2</text:span><text:span text:style-name="NormalTok">, </text:span><text:span text:style-name="SpecialCharTok">-</text:span><text:span text:style-name="DecValTok">1</text:span><text:span text:style-name="NormalTok">, </text:span><text:span text:style-name="DecValTok">4</text:span><text:span text:style-name="NormalTok">, </text:span>
</text:p>
      <text:p text:style-name="Preformatted_20_Text">
<text:span text:style-name="NormalTok"><text:s text:c="14"/></text:span><text:span text:style-name="DecValTok">1</text:span><text:span text:style-name="NormalTok">, </text:span><text:span text:style-name="DecValTok">1</text:span><text:span text:style-name="NormalTok">, </text:span><text:span text:style-name="SpecialCharTok">-</text:span><text:span text:style-name="DecValTok">2</text:span><text:span text:style-name="NormalTok">), </text:span><text:span text:style-name="AttributeTok">nrow =</text:span><text:span text:style-name="NormalTok"><text:s text:c="1"/></text:span><text:span text:style-name="DecValTok">3</text:span><text:span text:style-name="NormalTok">, </text:span><text:span text:style-name="AttributeTok">byrow =</text:span><text:span text:style-name="NormalTok"><text:s text:c="1"/></text:span><text:span text:style-name="ConstantTok">TRUE</text:span><text:span text:style-name="NormalTok">)</text:span>
</text:p>
      <text:p text:style-name="Preformatted_20_Text">
</text:p>
      <text:p text:style-name="Preformatted_20_Text">
<text:span text:style-name="NormalTok">b </text:span><text:span text:style-name="OtherTok">&lt;-</text:span><text:span text:style-name="NormalTok"><text:s text:c="1"/></text:span><text:span text:style-name="FunctionTok">c</text:span><text:span text:style-name="NormalTok">(</text:span><text:span text:style-name="DecValTok">1</text:span><text:span text:style-name="NormalTok">, </text:span><text:span text:style-name="SpecialCharTok">-</text:span><text:span text:style-name="DecValTok">2</text:span><text:span text:style-name="NormalTok">, </text:span><text:span text:style-name="DecValTok">0</text:span><text:span text:style-name="NormalTok">)</text:span>
</text:p>
      <text:p text:style-name="Preformatted_20_Text">
</text:p>
      <text:p text:style-name="Preformatted_20_Text">
<text:span text:style-name="NormalTok">RowRed </text:span><text:span text:style-name="OtherTok">&lt;-</text:span><text:span text:style-name="NormalTok"><text:s text:c="1"/></text:span><text:span text:style-name="ControlFlowTok">function</text:span><text:span text:style-name="NormalTok">(A, b){</text:span>
</text:p>
      <text:p text:style-name="Preformatted_20_Text">
<text:span text:style-name="NormalTok"><text:s text:c="2"/></text:span><text:span text:style-name="CommentTok">#spojime A a b do jednej rozširenej matice</text:span>
</text:p>
      <text:p text:style-name="Preformatted_20_Text">
<text:span text:style-name="NormalTok"><text:s text:c="2"/>Ab </text:span><text:span text:style-name="OtherTok">&lt;-</text:span><text:span text:style-name="NormalTok"><text:s text:c="1"/></text:span><text:span text:style-name="FunctionTok">cbind</text:span><text:span text:style-name="NormalTok">(A, b)</text:span>
</text:p>
      <text:p text:style-name="Preformatted_20_Text">
<text:span text:style-name="NormalTok"><text:s text:c="2"/></text:span><text:span text:style-name="CommentTok">#zistime dim(A), za predpokladu že A je štvorcova</text:span>
</text:p>
      <text:p text:style-name="Preformatted_20_Text">
<text:span text:style-name="NormalTok"><text:s text:c="2"/>n </text:span><text:span text:style-name="OtherTok">&lt;-</text:span><text:span text:style-name="NormalTok"><text:s text:c="1"/></text:span><text:span text:style-name="FunctionTok">nrow</text:span><text:span text:style-name="NormalTok">(Ab)</text:span>
</text:p>
      <text:p text:style-name="Preformatted_20_Text">
</text:p>
      <text:p text:style-name="Preformatted_20_Text">
<text:span text:style-name="NormalTok"><text:s text:c="2"/></text:span><text:span text:style-name="CommentTok">#posuvame na na predposledni diagonalny prvok</text:span>
</text:p>
      <text:p text:style-name="Preformatted_20_Text">
<text:span text:style-name="NormalTok"><text:s text:c="2"/></text:span><text:span text:style-name="ControlFlowTok">for</text:span><text:span text:style-name="NormalTok"><text:s text:c="1"/>(i </text:span><text:span text:style-name="ControlFlowTok">in</text:span><text:span text:style-name="NormalTok"><text:s text:c="1"/></text:span><text:span text:style-name="DecValTok">1</text:span><text:span text:style-name="SpecialCharTok">:</text:span><text:span text:style-name="NormalTok">(n</text:span><text:span text:style-name="DecValTok">-1</text:span><text:span text:style-name="NormalTok">)){</text:span>
</text:p>
      <text:p text:style-name="Preformatted_20_Text">
<text:span text:style-name="NormalTok"><text:s text:c="4"/></text:span><text:span text:style-name="CommentTok">#---mechanizmus na vymenu ridkov v pripade ak trapim na 0 na diagonale</text:span>
</text:p>
      <text:p text:style-name="Preformatted_20_Text">
</text:p>
      <text:p text:style-name="Preformatted_20_Text">
<text:span text:style-name="NormalTok"><text:s text:c="4"/></text:span><text:span text:style-name="CommentTok">#tu sa zisti max v stlpci a porovna sa s "počitačovou" nulou</text:span>
</text:p>
      <text:p text:style-name="Preformatted_20_Text">
<text:span text:style-name="NormalTok"><text:s text:c="4"/>pivot_indx </text:span><text:span text:style-name="OtherTok">&lt;-</text:span><text:span text:style-name="NormalTok"><text:s text:c="1"/></text:span><text:span text:style-name="FunctionTok">which.max</text:span><text:span text:style-name="NormalTok">(</text:span><text:span text:style-name="FunctionTok">abs</text:span><text:span text:style-name="NormalTok">(Ab[(i</text:span><text:span text:style-name="SpecialCharTok">:</text:span><text:span text:style-name="NormalTok">n), i]))</text:span><text:span text:style-name="SpecialCharTok">+</text:span><text:span text:style-name="NormalTok">i</text:span><text:span text:style-name="DecValTok">-1</text:span>
</text:p>
      <text:p text:style-name="Preformatted_20_Text">
</text:p>
      <text:p text:style-name="Preformatted_20_Text">
<text:span text:style-name="NormalTok"><text:s text:c="4"/></text:span><text:span text:style-name="ControlFlowTok">if</text:span><text:span text:style-name="NormalTok"><text:s text:c="1"/>(</text:span><text:span text:style-name="FunctionTok">abs</text:span><text:span text:style-name="NormalTok">(Ab[pivot_indx, i]) </text:span><text:span text:style-name="SpecialCharTok">&lt;</text:span><text:span text:style-name="NormalTok"><text:s text:c="1"/></text:span><text:span text:style-name="FloatTok">1e-15</text:span><text:span text:style-name="NormalTok">){</text:span>
</text:p>
      <text:p text:style-name="Preformatted_20_Text">
<text:span text:style-name="NormalTok"><text:s text:c="6"/></text:span><text:span text:style-name="ControlFlowTok">next</text:span>
</text:p>
      <text:p text:style-name="Preformatted_20_Text">
<text:span text:style-name="NormalTok"><text:s text:c="4"/>}</text:span>
</text:p>
      <text:p text:style-name="Preformatted_20_Text">
</text:p>
      <text:p text:style-name="Preformatted_20_Text">
<text:span text:style-name="NormalTok"><text:s text:c="4"/></text:span><text:span text:style-name="CommentTok">#samotna vymena</text:span>
</text:p>
      <text:p text:style-name="Preformatted_20_Text">
<text:span text:style-name="NormalTok"><text:s text:c="4"/></text:span><text:span text:style-name="ControlFlowTok">if</text:span><text:span text:style-name="NormalTok"><text:s text:c="1"/>(pivot_indx </text:span><text:span text:style-name="SpecialCharTok">!=</text:span><text:span text:style-name="NormalTok"><text:s text:c="1"/>i){</text:span>
</text:p>
      <text:p text:style-name="Preformatted_20_Text">
<text:span text:style-name="NormalTok"><text:s text:c="6"/>tmp_row </text:span><text:span text:style-name="OtherTok">&lt;-</text:span><text:span text:style-name="NormalTok"><text:s text:c="1"/>Ab[i, ]</text:span>
</text:p>
      <text:p text:style-name="Preformatted_20_Text">
<text:span text:style-name="NormalTok"><text:s text:c="6"/>Ab[i, ] </text:span><text:span text:style-name="OtherTok">&lt;-</text:span><text:span text:style-name="NormalTok"><text:s text:c="1"/>Ab[pivot_indx, ]</text:span>
</text:p>
      <text:p text:style-name="Preformatted_20_Text">
<text:span text:style-name="NormalTok"><text:s text:c="6"/>Ab[pivot_indx, ] </text:span><text:span text:style-name="OtherTok">&lt;-</text:span><text:span text:style-name="NormalTok"><text:s text:c="1"/>tmp_row</text:span>
</text:p>
      <text:p text:style-name="Preformatted_20_Text">
<text:span text:style-name="NormalTok"><text:s text:c="4"/>}</text:span>
</text:p>
      <text:p text:style-name="Preformatted_20_Text">
<text:span text:style-name="NormalTok"><text:s text:c="4"/></text:span><text:span text:style-name="CommentTok">#---</text:span>
</text:p>
      <text:p text:style-name="Preformatted_20_Text">
<text:span text:style-name="NormalTok"><text:s text:c="4"/></text:span><text:span text:style-name="CommentTok">#tu potom prebieha eliminacia(dolny riadok - prislušny nasobok horneho)</text:span>
</text:p>
      <text:p text:style-name="Preformatted_20_Text">
<text:span text:style-name="NormalTok"><text:s text:c="4"/></text:span><text:span text:style-name="ControlFlowTok">for</text:span><text:span text:style-name="NormalTok"><text:s text:c="1"/>(j </text:span><text:span text:style-name="ControlFlowTok">in</text:span><text:span text:style-name="NormalTok"><text:s text:c="1"/>(i</text:span><text:span text:style-name="SpecialCharTok">+</text:span><text:span text:style-name="DecValTok">1</text:span><text:span text:style-name="NormalTok">)</text:span><text:span text:style-name="SpecialCharTok">:</text:span><text:span text:style-name="NormalTok">n){</text:span>
</text:p>
      <text:p text:style-name="Preformatted_20_Text">
<text:span text:style-name="NormalTok"><text:s text:c="6"/>factor </text:span><text:span text:style-name="OtherTok">&lt;-</text:span><text:span text:style-name="NormalTok"><text:s text:c="1"/>Ab[j, i] </text:span><text:span text:style-name="SpecialCharTok">/</text:span><text:span text:style-name="NormalTok"><text:s text:c="1"/>Ab[i, i]</text:span>
</text:p>
      <text:p text:style-name="Preformatted_20_Text">
<text:span text:style-name="NormalTok"><text:s text:c="6"/>Ab[j, ] </text:span><text:span text:style-name="OtherTok">&lt;-</text:span><text:span text:style-name="NormalTok"><text:s text:c="1"/>Ab[j, ] </text:span><text:span text:style-name="SpecialCharTok">-</text:span><text:span text:style-name="NormalTok"><text:s text:c="1"/>factor </text:span><text:span text:style-name="SpecialCharTok">*</text:span><text:span text:style-name="NormalTok"><text:s text:c="1"/>Ab[i, ]</text:span>
</text:p>
      <text:p text:style-name="Preformatted_20_Text">
<text:span text:style-name="NormalTok"><text:s text:c="4"/>}</text:span>
</text:p>
      <text:p text:style-name="Preformatted_20_Text">
<text:span text:style-name="NormalTok"><text:s text:c="2"/>}</text:span>
</text:p>
      <text:p text:style-name="Preformatted_20_Text">
<text:span text:style-name="NormalTok"><text:s text:c="2"/></text:span><text:span text:style-name="CommentTok">#zapsmall() vracia 0 namiesto nekonečne maleho zlomku</text:span>
</text:p>
      <text:p text:style-name="Preformatted_20_Text">
<text:span text:style-name="NormalTok"><text:s text:c="2"/></text:span><text:span text:style-name="FunctionTok">return</text:span><text:span text:style-name="NormalTok">(</text:span><text:span text:style-name="FunctionTok">list</text:span><text:span text:style-name="NormalTok">(</text:span>
</text:p>
      <text:p text:style-name="Preformatted_20_Text">
<text:span text:style-name="NormalTok"><text:s text:c="4"/></text:span><text:span text:style-name="AttributeTok">A_Red =</text:span><text:span text:style-name="NormalTok"><text:s text:c="1"/></text:span><text:span text:style-name="FunctionTok">zapsmall</text:span><text:span text:style-name="NormalTok">(Ab[, </text:span><text:span text:style-name="DecValTok">1</text:span><text:span text:style-name="SpecialCharTok">:</text:span><text:span text:style-name="NormalTok">n]),</text:span>
</text:p>
      <text:p text:style-name="Preformatted_20_Text">
<text:span text:style-name="NormalTok"><text:s text:c="4"/></text:span><text:span text:style-name="AttributeTok">b_Red =</text:span><text:span text:style-name="NormalTok"><text:s text:c="1"/></text:span><text:span text:style-name="FunctionTok">zapsmall</text:span><text:span text:style-name="NormalTok">(Ab[, (n</text:span><text:span text:style-name="SpecialCharTok">+</text:span><text:span text:style-name="DecValTok">1</text:span><text:span text:style-name="NormalTok">)])</text:span>
</text:p>
      <text:p text:style-name="Preformatted_20_Text">
<text:span text:style-name="NormalTok"><text:s text:c="4"/>)</text:span>
</text:p>
      <text:p text:style-name="Preformatted_20_Text">
<text:span text:style-name="NormalTok"><text:s text:c="2"/>)</text:span>
</text:p>
      <text:p text:style-name="Preformatted_20_Text">
<text:span text:style-name="NormalTok">}</text:span>
</text:p>
      <text:p text:style-name="Preformatted_20_Text">
</text:p>
      <text:p text:style-name="Preformatted_20_Text">
<text:span text:style-name="CommentTok"># Riešenie sústavy</text:span>
</text:p>
      <text:p text:style-name="Preformatted_20_Text">
<text:span text:style-name="NormalTok">ext_r </text:span><text:span text:style-name="OtherTok">&lt;-</text:span><text:span text:style-name="NormalTok"><text:s text:c="1"/></text:span><text:span text:style-name="FunctionTok">RowRed</text:span><text:span text:style-name="NormalTok">(A, b)</text:span>
</text:p>
      <text:p text:style-name="Preformatted_20_Text">
<text:span text:style-name="NormalTok">x_vysledok </text:span><text:span text:style-name="OtherTok">&lt;-</text:span><text:span text:style-name="NormalTok"><text:s text:c="1"/></text:span><text:span text:style-name="FunctionTok">solve</text:span><text:span text:style-name="NormalTok">(ext_r</text:span><text:span text:style-name="SpecialCharTok">$</text:span><text:span text:style-name="NormalTok">A_Red, ext_r</text:span><text:span text:style-name="SpecialCharTok">$</text:span><text:span text:style-name="NormalTok">b_Red)</text:span>
</text:p>
      <text:p text:style-name="First_20_paragraph">Výsledný vektor riešení je <draw:frame draw:style-name="fr1" text:anchor-type="as-char"><draw:object xlink:href="Formula-8/" xlink:type="simple" xlink:show="embed" xlink:actuate="onLoad"/></draw:frame>.</text:p>
      <text:h text:style-name="Heading_20_2" text:outline-level="2"><text:bookmark-start text:name="vizualizácia-matice"/>4 Vizualizácia matice<text:bookmark-end text:name="vizualizácia-matice"/></text:h>
      <text:p text:style-name="First_20_paragraph">Pre lepšiu interpretáciu môžeme zobraziť „teplotnú mapu“ (heatmap) koeficientov matice <draw:frame draw:style-name="fr1" text:anchor-type="as-char"><draw:object xlink:href="Formula-10/" xlink:type="simple" xlink:show="embed" xlink:actuate="onLoad"/></draw:frame>.</text:p>
      <table:table table:name="Table1" table:style-name="Table1">
        <table:table-column table:style-name="Table1.A"/>
        <table:table-row>
          <table:table-cell table:style-name="TableRowCell" office:value-type="string">
            <text:section text:name="fig-matrix">
              <text:p text:style-name="First_20_paragraph"><draw:frame draw:name="img1" svg:width="363.7894736842105pt" svg:height="291.0315789473684pt"><draw:image xlink:href="Pictures/12.png" xlink:type="simple" xlink:show="embed" xlink:actuate="onLoad"/></draw:frame></text:p>
              <text:p text:style-name="FigureCaption">Obrázok 1: Vizualizácia hodnôt v matici koeficientov A</text:p>
            </text:section>
          </table:table-cell>
        </table:table-row>
      </table:table>
      <text:h text:style-name="Heading_20_2" text:outline-level="2"><text:bookmark-start text:name="záver-a-zhodnotenie"/>5 Záver a zhodnotenie<text:bookmark-end text:name="záver-a-zhodnotenie"/></text:h>
      <text:p text:style-name="First_20_paragraph">V tomto projekte sme demonštrovali silu systému R pri riešení lineárnych systémov. Metóda <text:a xlink:type="simple" xlink:href="#eq-maticovy-tvar" office:name=""><text:span text:style-name="Definition">1</text:span></text:a> je základom pre zložitejšie algoritmy v materiálovom výskume. Kombinácia numerickej presnosti a možností vizualizácie (<text:a xlink:type="simple" xlink:href="#fig-matrix" office:name=""><text:span text:style-name="Definition">Obr. 1</text:span></text:a>) robí z Quarto ideálny nástroj pre technické správy.</text:p>
      <text:h text:style-name="Heading_20_2" text:outline-level="2"><text:bookmark-start text:name="literatura"/>6 Literatura<text:bookmark-end text:name="literatura"/></text:h>
      <text:section text:name="refs">
        <text:section text:name="ref-gauss_ref">
          <text:p text:style-name="First_20_paragraph">Strang, Gilbert. 2016. <text:span text:style-name="T1">Linear Algebra and Its Applications</text:span>. Wellesley-Cambridge Press.</text:p>
        </text:section>
      </text:section>
      <text:p text:style-name="Horizontal_20_Line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sk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sk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sk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sk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Riešenie sústav lineárnych rovníc pomocou Gaussovej eliminačnej metódy</dc:title>
    <dc:description/>
    <dc:subject/>
    <meta:keyword/>
    <dc:language>sk</dc:language>
    <meta:initial-creator>Aliaksandra Kibryk</meta:initial-creator>
    <dc:creator>Aliaksandra Kibryk</dc:creator>
    <meta:creation-date>2026-05-10T19:06:10Z</meta:creation-date>
    <dc:date>2026-05-10T19:06:10Z</dc:date>
    <meta:user-defined meta:name="authors" meta:value-type="string"/>
    <meta:user-defined meta:name="biblio-config" meta:value-type="string">True</meta:user-defined>
    <meta:user-defined meta:name="bibliography" meta:value-type="string">liter.bib</meta:user-defined>
    <meta:user-defined meta:name="by-author" meta:value-type="string"/>
    <meta:user-defined meta:name="crossref" meta:value-type="string"/>
    <meta:user-defined meta:name="date" meta:value-type="string">2026-04-18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toc-title" meta:value-type="string">Obsah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i>𝐀</mi>
</math>
</file>

<file path=Formula-2/content.xml><?xml version="1.0" encoding="utf-8"?>
<math xmlns="http://www.w3.org/1998/Math/MathML" display="inline">
  <mi>n</mi>
</math>
</file>

<file path=Formula-4/content.xml><?xml version="1.0" encoding="utf-8"?>
<math xmlns="http://www.w3.org/1998/Math/MathML" display="block">
  <mrow>
    <mi>𝐀</mi>
    <mover>
      <mi>x</mi>
      <mo accent="true">→</mo>
    </mover>
    <mo>=</mo>
    <mover>
      <mi>b</mi>
      <mo accent="true">→</mo>
    </mover>
    <mspace width="2.0em"/>
    <mo stretchy="false" form="prefix">(</mo>
    <mn>1</mn>
    <mo stretchy="false" form="postfix">)</mo>
  </mrow>
</math>
</file>

<file path=Formula-6/content.xml><?xml version="1.0" encoding="utf-8"?>
<math xmlns="http://www.w3.org/1998/Math/MathML" display="inline">
  <mrow>
    <mo stretchy="false" form="prefix">(</mo>
    <mi>𝐀</mi>
    <mo stretchy="false" form="prefix">|</mo>
    <mover>
      <mi>b</mi>
      <mo accent="true">→</mo>
    </mover>
    <mo stretchy="false" form="postfix">)</mo>
  </mrow>
</math>
</file>

<file path=Formula-8/content.xml><?xml version="1.0" encoding="utf-8"?>
<math xmlns="http://www.w3.org/1998/Math/MathML" display="inline">
  <mrow>
    <mover>
      <mi>x</mi>
      <mo accent="true">→</mo>
    </mover>
    <mo>=</mo>
    <mo stretchy="false" form="prefix">(</mo>
    <mi>−</mi>
    <mn>1.14</mn>
    <mo>,</mo>
    <mn>2.57</mn>
    <mo>,</mo>
    <mn>0.71</mn>
    <msup>
      <mo stretchy="false" form="postfix">)</mo>
      <mi>T</mi>
    </msup>
  </mrow>
</math>
</file>